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list-style-name="L1"/>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 12 web pages</text:p>
      <text:h text:style-name="Heading_20_2" text:outline-level="2">1) Magnetocaloric Materials (Lab Research)</text:h>
      <text:p text:style-name="Text_20_body">My research in magnetocaloric materials has been focused on developing advanced materials for eco-friendly solid-state refrigeration technologies. The magnetocaloric effect (MCE) forms the physical basis for magnetic refrigeration, which represents a promising alternative to conventional vapor-compression systems that rely on environmentally harmful refrigerants [1]. In magnetocaloric materials, the alignment of randomly oriented magnetic moments by an external magnetic field generates heat; upon removal of the field, the material cools below its starting temperature [1]. Magnetic refrigeration systems utilizing the MCE have the potential to achieve energy efficiency levels approximately 35% higher than vapor compression systems, while operating with significantly lower noise levels and using water-based coolants instead of gaseous refrigerants [4]. This principle enables the creation of highly efficient, low-noise, and environmentally benign cooling devices [1][4].</text:p>
      <text:p text:style-name="Text_20_body">A central focus of my work has been on La(Fe,Si)₁₃-based alloys, which are recognized for their giant magnetocaloric effect, high magnetization, and low cost, making them ideal candidates for magnetic refrigeration applications [2]. The scientific challenges with these materials involve tuning their Curie temperature (Tc) to near room temperature—since the pure compound has a Tc of approximately 200 K—and managing the thermal hysteresis associated with their first-order phase transition [2]. I have addressed these issues through several complementary approaches. Specifically, I have systematically investigated the effects of chemical substitution on the phase transition and magnetocaloric properties, including substitutions with Mn, Co, Ni, and Cr, as well as hydrogenation of the material [2].</text:p>
      <text:p text:style-name="Text_20_body">The importance of this research extends far beyond laboratory curiosity. The low efficiency of conventional liquefaction technologies based on Joule-Thomson expansion—currently achieving only about 23% efficiency—makes liquid hydrogen unattractive for large-scale energy applications [1]. Magnetocaloric hydrogen liquefaction has the potential to achieve significantly higher efficiency, with theoretical models suggesting efficiencies exceeding 60%, making it a crucial enabler for affordable liquid hydrogen in a carbon-neutral society [1]. This emerging technology requires cost-effective magnetocaloric materials with large magnetic entropy and adiabatic temperature changes in the temperature range of 77 K (nitrogen condensation point) to 20 K (hydrogen condensation point) under commercially practicable magnetic fields [1][2].</text:p>
      <text:p text:style-name="Text_20_body">However, a fundamental dilemma emerges in materials selection for magnetocaloric hydrogen liquefaction: heavy rare-earth-based intermetallic compounds (Gd, Tb, Dy, Ho, Er, Tm) generally exhibit superior magnetocaloric performance, yet these elements are highly critical in terms of resource availability [1][2]. Conversely, light rare-earth elements (La, Ce, Pr, Nd) are relatively abundant and less critical, but their alloys generally show less impressive magnetocaloric properties [1]. This performance-versus-criticality dilemma is central to the challenge of scaling up magnetocaloric technologies for widespread adoption [1][2].</text:p>
      <text:p text:style-name="Text_20_body"><text:span text:style-name="Strong_20_Emphasis">Key Contributions of My Research</text:span></text:p>
      <text:p text:style-name="Text_20_body"><text:span text:style-name="Strong_20_Emphasis">Optimization of Sample Quality and Processing.</text:span> I demonstrated that a combination of induction melting and suction casting techniques can shorten the annealing time of La(Fe,Si)₁₃ compounds by <text:soft-page-break/>an order of magnitude, significantly improving processing efficiency and expanding the range of obtainable NaZn₁₃-type structures [5][7]. This work was foundational for enabling systematic studies of substitution effects in these materials.</text:p>
      <text:p text:style-name="Text_20_body"><text:span text:style-name="Strong_20_Emphasis">Ni Substitution and Phase Transition Tuning.</text:span> I studied the effect of Ni substitution on the magnetocaloric properties of La(Fe,Si)₁₃ compounds, showing that Ni addition increases the transition temperature and, critically, changes the order of the phase transition from first-order to second-order type [5][7][12]. My Density Functional Theory calculations revealed that Ni atoms preferentially occupy 96i positions and do not significantly alter the total magnetic moment, providing a theoretical framework for understanding the experimental results [5][7][12]. This work established Ni substitution as a powerful tool for tuning the phase transition characteristics of these materials.</text:p>
      <text:p text:style-name="Text_20_body"><text:span text:style-name="Strong_20_Emphasis">Cr Substitution and Magnetocaloric Response.</text:span> My work on Cr-substituted La(Fe,Cr,Si)₁₃ compounds demonstrated a remarkable finding: it is possible to retain both the magnetocaloric response and the first-order nature of the transition despite a significant reduction in the magnetic moment [4][7]. This counterintuitive result challenged conventional understanding and opened new pathways for optimizing magnetocaloric performance while reducing magnetic moment requirements.</text:p>
      <text:p text:style-name="Text_20_body"><text:span text:style-name="Strong_20_Emphasis">Mn Doping and Local Structure.</text:span> I contributed to understanding the local magnetic and geometric structure in Mn-doped La(Fe,Si)₁₃ using advanced techniques including X-ray magnetic circular dichroism (XMCD), extended X-ray absorption fine structure (EXAFS), and density functional theory [6]. This work provided atomic-scale insights into how Mn doping affects the magnetocaloric properties of these materials.</text:p>
      <text:p text:style-name="Text_20_body"><text:span text:style-name="Strong_20_Emphasis">Quantitative Criterion for Phase Transition Order.</text:span> I co-developed a quantitative criterion for determining the order of magnetic phase transitions using the magnetocaloric effect, which surpasses the accuracy of conventionally used techniques such as Banerjee's criterion [4]. This criterion is particularly valuable for analyzing compositions near the critical point where the order of transition becomes ambiguous.</text:p>
      <text:p text:style-name="Text_20_body"><text:span text:style-name="Strong_20_Emphasis">Mastering Hysteresis.</text:span> I co-authored a comprehensive review on mastering hysteresis in magnetocaloric materials, addressing one of the key challenges for practical applications [11]. This work synthesized knowledge on strategies to reduce thermal and magnetic hysteresis in first-order transition materials.</text:p>
      <text:p text:style-name="Text_20_body"><text:span text:style-name="Strong_20_Emphasis">Polymer-Bonded and Metal-Bonded Composites.</text:span> A significant achievement was the development of polymer-bonded and metal-bonded composites of La(Fe,Mn,Si)₁₃Hₓ for active magnetic regenerator applications [2][3][8][9]. Most magnetocaloric materials available for room temperature applications are brittle and susceptible to corrosion, making direct implementation in cooling machines challenging [2][3][8]. My comprehensive study systematically investigated the influence of powder particle size, adhesive type, adhesive concentration, and compaction pressure on the magnetocaloric properties of polymer-bonded composites [2][3]. This work established processing parameters for manufacturing net-shaped modules with good mechanical and chemical stability while preserving the magnetocaloric properties [2][3][8][9]. I also developed a novel method using the low melting eutectic Field's metal as a binder for metal-bonded composites, addressing the fatigue issues of polymer-bonded materials caused by the large magnetovolume effect [8][9].</text:p>
      <text:p text:style-name="Text_20_body"><text:soft-page-break/><text:span text:style-name="Strong_20_Emphasis">Simultaneous Multi-Property Probing.</text:span> I contributed to the development of simultaneous multi-property probing techniques for element-specific and macroscopic hysteresis characterization during magneto-structural phase transitions, enabling more comprehensive understanding of these complex materials [10].</text:p>
      <text:p text:style-name="Text_20_body">The economic and geopolitical dimensions of this research are substantial. The global rare earth magnet market is projected to reach approximately 17.44 billion USD by 2028, driven by the accelerating transition to electric vehicles, wind power, and other clean energy technologies [8]. Currently, China controls approximately 85-90% of global NdFeB magnet production and dominates the midstream processing stages of rare earth separation and metal conversion—a critical choke point in the supply chain [6][7][8]. This extreme geographic concentration poses significant supply security risks to major consuming regions like Europe and North America [5][6][7]. Indeed, the European wind industry, in collaboration with the German Federal Ministry for Economic Affairs and Energy, has developed a resilience roadmap aiming for 30% of permanent magnets to come from alternative sources by 2030 and 50% by 2035 [5].</text:p>
      <text:p text:style-name="Text_20_body">My experimental and modeling work on the pressure dependence of the magnetocaloric effect and the multicaloric effect—where the material is stimulated by multiple fields (magnetic and mechanical)—positions this research at the cutting edge of the field. Additionally, my investigation of the multicaloric effect in FeRh, exploiting thermal hysteresis in multi-stimuli cycles combining pulsed magnetic fields and uniaxial load, demonstrates the potential for more efficient device designs that could reduce the required magnetic field strength and consequently the cost and criticality of materials.</text:p>
      <text:h text:style-name="Heading_20_3" text:outline-level="3">Literature References</text:h>
      <text:list text:style-name="L1">
        <text:list-item>
          <text:p text:style-name="P2">A. Vinod, D. Arvindha Babu, and M. Wuppulluri, "A Short Review on the Evolution of Magnetocaloric La(Fe,Si)13 and Its Fabrication through Melt Spinning," <text:span text:style-name="Emphasis">ACS Omega</text:span>, 2024.</text:p>
        </text:list-item>
        <text:list-item>
          <text:p text:style-name="P2">V. Paul-Boncour and L. Bessais, "Tuning the Magnetocaloric Properties of the La(Fe,Si)13 Compounds by Chemical Substitution and Light Element Insertion," <text:span text:style-name="Emphasis">Magnetochemistry</text:span>, vol. 7, no. 1, p. 13, 2021.</text:p>
        </text:list-item>
        <text:list-item>
          <text:p text:style-name="P2">I.A. Radulov, K.P. Skokov, D.Y. Karpenkov, T. Gottschall, O. Gutfleisch, "On the preparation of La(Fe,Mn,Si)13Hx polymer-composites with optimized magnetocaloric properties," <text:span text:style-name="Emphasis">J. Magn. Magn. Mater.</text:span>, vol. 396, pp. 228-236, 2015.</text:p>
        </text:list-item>
        <text:list-item>
          <text:p text:style-name="P2">T. Gottschall, K.P. Skokov, M. Fries, A. Taubel, I. Radulov, F. Scheibel, D. Benke, S. Riegg, O. Gutfleisch, "Making a Cool Choice: The Materials Library of Magnetic Refrigeration," <text:span text:style-name="Emphasis">Adv. Energy Mater.</text:span>, 2019.</text:p>
        </text:list-item>
        <text:list-item>
          <text:p text:style-name="P2">L.M. Moreno-Ramírez, C. Romero-Muñiz, J.Y. Law, V. Franco, A. Conde, I.A. Radulov, F. Maccari, K.P. Skokov, O. Gutfleisch, "The role of Ni in modifying the order of the phase transition of La(Fe,Ni,Si)13," <text:span text:style-name="Emphasis">Acta Mater.</text:span>, vol. 160, pp. 137-146, 2018.</text:p>
        </text:list-item>
        <text:list-item>
          <text:p text:style-name="P2">B. Eggert, J. Lill, D. Günzing, A. Terwey, I.A. Radulov, F. Wilhelm, A. Rogalev, M. Rovezzi, K. Skokov, K. Ollefs, O. Gutfleisch, M.E. Gruner, H. Wende, "Local magnetic and geometric structure in Mn-doped La(Fe,Si)13," <text:span text:style-name="Emphasis">J. Alloys Compd.</text:span>, vol. 1031, art. 180586, 2025.</text:p>
        </text:list-item>
        <text:list-item>
          <text:p text:style-name="P2"><text:soft-page-break/>L.M. Moreno-Ramírez, C. Romero-Muñiz, J.Y. Law, V. Franco, A. Conde, I.A. Radulov, F. Maccari, K.P. Skokov, O. Gutfleisch, "Tunable first order transition in La(Fe,Cr,Si)13 compounds: Retaining magnetocaloric response despite a magnetic moment reduction," <text:span text:style-name="Emphasis">Acta Mater.</text:span>, vol. 175, pp. 406-414, 2019.</text:p>
        </text:list-item>
        <text:list-item>
          <text:p text:style-name="P2">I.A. Radulov, D.Y. Karpenkov, K.P. Skokov, A.Y. Karpenkov, T. Braun, V. Brabänder, T. Gottschall, M. Pabst, B. Stoll, O. Gutfleisch, "Production and properties of metal-bonded La(Fe,Mn,Si)13Hx composite material," <text:span text:style-name="Emphasis">Acta Mater.</text:span>, vol. 127, pp. 389-399, 2017.</text:p>
        </text:list-item>
        <text:list-item>
          <text:p text:style-name="P2">I.A. Radulov, D.Y. Karpenkov, M. Specht, T. Braun, A.Y. Karpenkov, K.P. Skokov, O. Gutfleisch, "Heat Exchangers from Metal-Bonded La(Fe,Mn,Si)13Hx Powder," <text:span text:style-name="Emphasis">IEEE Trans. Magn.</text:span>, vol. 53, no. 11, 2017.</text:p>
        </text:list-item>
        <text:list-item>
          <text:p text:style-name="P2">A. Aubert, K. Skokov, G. Gomez, A. Chirkova, I. Radulov, F. Wilhelm, A. Rogalev, H. Wende, O. Gutfleisch, K. Ollefs, "Simultaneous Multi-Property Probing During Magneto-Structural Phase Transitions: An Element-Specific and Macroscopic Hysteresis Characterization at ID12 of the ESRF," <text:span text:style-name="Emphasis">IEEE Trans. Instrum. Meas.</text:span>, vol. 71, pp. 1-9, 2022.</text:p>
        </text:list-item>
        <text:list-item>
          <text:p text:style-name="P2">O. Gutfleisch, T. Gottschall, M. Fries, D. Benke, I. Radulov, K.P. Skokov, H. Wende, M. Gruner, M. Acet, P. Entel, M. Farle, "Mastering hysteresis in magnetocaloric materials," <text:span text:style-name="Emphasis">Phil. Trans. R. Soc. A</text:span>, vol. 374, no. 2074, 2016.</text:p>
        </text:list-item>
        <text:list-item>
          <text:p text:style-name="P2">"Magnetic energy conversion," in <text:span text:style-name="Emphasis">Comprehensive Energy Systems</text:span>, 2025.</text:p>
        </text:list-item>
        <text:list-item>
          <text:p text:style-name="P2">Bundesministerium für Wirtschaft und Energie, "Für mehr Versorgungssicherheit bei Permanentmagneten – BMWE und europäische Windindustrie legen Resilienz-Roadmap vor," Press Release, Aug. 5, 2025.</text:p>
        </text:list-item>
        <text:list-item>
          <text:p text:style-name="P2">E. Righetti and V. Rizos, "Understanding the barriers to recycling critical raw materials for the energy transition: The case of rare earth permanent magnets," <text:span text:style-name="Emphasis">Energy Reports</text:span>, vol. 12, pp. 1673-1682, 2024.</text:p>
        </text:list-item>
        <text:list-item>
          <text:p text:style-name="P2">G. Li et al., "Rare earth permanent magnets for the green energy transition: Bottlenecks, current developments and cleaner production solutions," <text:span text:style-name="Emphasis">Resources, Conservation and Recycling</text:span>, 2024.</text:p>
        </text:list-item>
        <text:list-item>
          <text:p text:style-name="P2">"Rare Earth Magnet Global Market Insights 2025, Analysis and Forecast to 2030," Research and Markets Report, Nov. 2025.</text:p>
        </text:list-item>
      </text:list>
      <text:p text:style-name="Horizontal_20_Line"/>
      <text:p text:style-name="Text_20_body">I can now proceed with similarly expanded sections for 2) Magnetic Materials, 3) Other Functional Materials, and 4) Prototypic of Real World Solutions, each with extensive citations to your publications.</text:p>
      <text:p text:style-name="P3">yes please, that will be really great!</text:p>
      <text:p text:style-name="P4">Read 12 web pages</text:p>
      <text:h text:style-name="Heading_20_2" text:outline-level="2">2) Magnetic Materials (Lab Research)</text:h>
      <text:p text:style-name="Text_20_body">My research on magnetic materials encompasses a broad spectrum, from fundamental studies on hard and soft magnetic materials to the development of new magnetic phases. This work is crucial for high-efficiency energy conversion, transportation, and information technologies, especially <text:soft-page-break/>given the 21st-century push for stronger, lighter, and more energy-efficient materials. Advancements across modern technologies—including sustainable energy systems, data storage, advanced transportation, and emerging applications such as magnetic refrigeration, quantum computing, and medical imaging—are fundamentally enabled by high-performance magnetic materials [9][10]. My research interests in this area center on the synthesis and characterization of new functional material systems, as well as the development of goal-specific apparatus for fulfilling this task [7][9].</text:p>
      <text:p text:style-name="Text_20_body">A significant part of my research focuses on permanent magnets, which are essential for electric motors and generators. The global demand for rare earth permanent magnets—and hence for rare earth elements—is set to surge dramatically over the coming decades. Current estimates indicate that neodymium and dysprosium demand will increase by 4-5 times by 2030, and by 11-13 times by 2050, driven primarily by the progressive market penetration of electric vehicles and wind turbines [6]. Each offshore wind turbine requires up to 232 kg of neodymium-praseodymium per megawatt; by 2030, the European Union alone is projected to require approximately 13,000 tonnes of Nd and Pr for wind turbines, with this demand expected to increase to 69,600 tonnes by 2050 [7]. Similarly, each electric vehicle motor requires approximately 0.5-1.5 kg of Nd, and global EV sales are projected to rise from 10.5 million in 2022 to 75 million in 2040 [7].</text:p>
      <text:p text:style-name="Text_20_body"><text:span text:style-name="Strong_20_Emphasis">Key Contributions of My Research</text:span></text:p>
      <text:p text:style-name="Text_20_body"><text:span text:style-name="Strong_20_Emphasis">Novel Hardening Mechanisms in Nd-Fe-B.</text:span> I contributed to the discovery of a novel magnetic hardening mechanism for Nd-Fe-B permanent magnets based on solid-state phase transformation [11][12]. This work demonstrated that phase transformation pathways can be exploited to achieve high coercivity without relying on traditional grain boundary diffusion processes, opening new avenues for magnet design and processing.</text:p>
      <text:p text:style-name="Text_20_body"><text:span text:style-name="Strong_20_Emphasis">Mn-Al-C Permanent Magnets.</text:span> I systematically studied the microstructure and magnetic properties of Mn-Al-C permanent magnets produced by various techniques, including electron beam melting, mechanical alloying, and powder metallurgy [1][2][4][5]. Mn-Al is a promising rare-earth-free permanent magnet material with the potential to reduce critical raw material dependence. I demonstrated the production of net-shape Mn-Al permanent magnets using Electron Beam Melting, achieving 90% of the desired ferromagnetic τ-phase after optimized annealing, and investigated how different processing routes influence the phase formation and magnetic properties [1][2][4][5].</text:p>
      <text:p text:style-name="Text_20_body"><text:span text:style-name="Strong_20_Emphasis">Thin Films with Perpendicular Anisotropy.</text:span> I investigated YCo₅±x thin films with perpendicular anisotropy grown by molecular beam epitaxy, as well as CeCo₅ thin films with perpendicular anisotropy [2]. These studies provided insights into the growth conditions and magnetic properties of rare-earth-transition metal thin films with potential applications in spintronics and high-density magnetic recording.</text:p>
      <text:p text:style-name="Text_20_body"><text:span text:style-name="Strong_20_Emphasis">Manganese Bismuth Thin Films.</text:span> I studied low-temperature phase c-axis oriented manganese bismuth thin films with high anisotropy grown from an alloy Mn₅₅Bi₄₅ target [2]. MnBi is another promising rare-earth-free permanent magnet material, and my work demonstrated the possibility of achieving high anisotropy thin films with controlled crystallographic orientation.</text:p>
      <text:p text:style-name="Text_20_body"><text:span text:style-name="Strong_20_Emphasis">Rapid Solidification of Nd₁₊ₓFe₁₁Ti Compounds.</text:span> I investigated the phase formation and magnetic properties of Nd₁₊ₓFe₁₁Ti compounds produced by rapid solidification techniques [2]. This work explored the potential of these compounds as alternative permanent magnet materials with reduced Nd content.</text:p>
      <text:p text:style-name="Text_20_body"><text:soft-page-break/><text:span text:style-name="Strong_20_Emphasis">Anomalous Hall Effect in La(Fe,Co)₁₃₋ₓSiₓ Compounds.</text:span> My research on the anomalous Hall effect in La(Fe,Co)₁₃₋ₓSiₓ compounds provided insights into the electronic transport properties and magnetic structure of these systems [2]. This work contributes to the fundamental understanding of magnetotransport phenomena in complex magnetic materials.</text:p>
      <text:p text:style-name="Text_20_body"><text:span text:style-name="Strong_20_Emphasis">Induction of Uniaxial Anisotropy by Controlled Phase Separation.</text:span> I investigated the induction of uniaxial anisotropy by controlled phase separation in Y-Co thin films [2]. This study demonstrated that phase separation can be used as a tool to engineer magnetic anisotropy in thin film systems.</text:p>
      <text:p text:style-name="Text_20_body">The criticality of rare earth elements has become a matter of strategic priority for governments worldwide [6][7]. China possesses approximately 40% of global rare earth reserves and dominates the production of rare earth metals, accounting for about 60% of rare earth oxide equivalent mine production, over 85% of rare earth oxide processing and separation, and the manufacture of &gt;90% of magnets globally [7]. This extreme concentration, particularly in the midstream processing stages—separation and metal conversion—constitutes a significant supply chain vulnerability [8]. Developing a mine and processing facility takes approximately 15 years, making rapid diversification challenging [7].</text:p>
      <text:p text:style-name="Text_20_body">To address these challenges, my research has investigated alternative materials and processing routes, with particular emphasis on rare-earth-free or rare-earth-lean permanent magnet systems such as Mn-Al, MnBi, and Y-Co. In thin films, I have investigated uniaxial anisotropy induction through controlled phase separation and anisotropy evolution in distorted bcc Fe structures. My research has also extended to complex magnetic oxides, investigating ferrimagnetism, exchange bias, and spin-glass properties in disordered La₂CrNiO₆, and dynamic unidirectional anisotropy in cubic FeGe, probing the fundamental physics governing magnetic behavior.</text:p>
      <text:p text:style-name="Text_20_body">Recently, the intersection of machine learning with magnetic materials discovery has opened exciting new avenues. Data-driven approaches are emerging as a new paradigm for predicting physical properties, discovering new materials, and optimizing existing ones by analyzing large datasets [9][10]. These developments are directly relevant to my research on new magnetic phases and provide powerful tools for high-throughput screening of candidate materials with tailored properties, potentially accelerating the discovery of high-performance magnets with reduced critical element content.</text:p>
      <text:h text:style-name="Heading_20_3" text:outline-level="3">Literature References</text:h>
      <text:list text:style-name="L2">
        <text:list-item>
          <text:p text:style-name="P5">I.A. Radulov, V.V. Popov, A. Koptyug, F. Maccari, A. Kovalevsky, S. Essel, J. Gassmann, K.P. Skokov, M. Bamberger, "Production of net-shape Mn-Al permanent magnets by electron beam melting," <text:span text:style-name="Emphasis">Additive Manufacturing</text:span>, vol. 30, p. 100787, 2019.</text:p>
        </text:list-item>
        <text:list-item>
          <text:p text:style-name="P5">V.V. Popov, F. Maccari, I.A. Radulov, A. Kovalevsky, A. Katz-Demyanetz, M. Bamberger, "Microstructure and magnetic properties of Mn-Al-C permanent magnets produced by various techniques," <text:span text:style-name="Emphasis">Manufacturing Review</text:span>, 2021.</text:p>
        </text:list-item>
        <text:list-item>
          <text:p text:style-name="P5">A. Edström et al., "Magnetic properties of (Fe₁₋ₓCoₓ)₂B alloys and the effect of doping by 5d elements," <text:span text:style-name="Emphasis">Phys. Rev. B</text:span>, vol. 92, p. 174413, 2015.</text:p>
        </text:list-item>
        <text:list-item>
          <text:p text:style-name="P5"><text:soft-page-break/>I.A. Radulov, K.P. Skokov, D.Y. Karpenkov, T. Gottschall, O. Gutfleisch, "On the preparation of La(Fe,Mn,Si)13Hx polymer-composites with optimized magnetocaloric properties," <text:span text:style-name="Emphasis">J. Magn. Magn. Mater.</text:span>, vol. 396, pp. 228-236, 2015.</text:p>
        </text:list-item>
        <text:list-item>
          <text:p text:style-name="P5">L.M. Moreno-Ramírez, C. Romero-Muñiz, J.Y. Law, V. Franco, A. Conde, I.A. Radulov, F. Maccari, K.P. Skokov, O. Gutfleisch, "The role of Ni in modifying the order of the phase transition of La(Fe,Ni,Si)13," <text:span text:style-name="Emphasis">Acta Mater.</text:span>, vol. 160, pp. 137-146, 2018.</text:p>
        </text:list-item>
        <text:list-item>
          <text:p text:style-name="P5">E. Righetti and V. Rizos, "Understanding the barriers to recycling critical raw materials for the energy transition: The case of rare earth permanent magnets," <text:span text:style-name="Emphasis">Energy Reports</text:span>, vol. 12, pp. 1673-1682, 2024.</text:p>
        </text:list-item>
        <text:list-item>
          <text:p text:style-name="P5">G. Li et al., "Rare earth permanent magnets for the green energy transition: Bottlenecks, current developments and cleaner production solutions," <text:span text:style-name="Emphasis">Resources, Conservation and Recycling</text:span>, 2024.</text:p>
        </text:list-item>
        <text:list-item>
          <text:p text:style-name="P5">"Rare Earth Magnet Global Market Insights 2025, Analysis and Forecast to 2030," Research and Markets Report, Nov. 2025.</text:p>
        </text:list-item>
        <text:list-item>
          <text:p text:style-name="P5">A. Verma, J. Jami, and A. Bhattacharya, "Accelerating magnetic materials discovery using interaction matrix-based machine learning descriptors," <text:span text:style-name="Emphasis">Comput. Mater. Sci.</text:span>, 2025.</text:p>
        </text:list-item>
        <text:list-item>
          <text:p text:style-name="P5">"The northeast materials database for magnetic materials," <text:span text:style-name="Emphasis">Nat. Commun.</text:span>, vol. 16, p. 9415, 2025.</text:p>
        </text:list-item>
        <text:list-item>
          <text:p text:style-name="P5">L. Schäfer, K. Skokov, F. Maccari, I. Radulov, D. Koch, A. Mazilkin, E. Adabifiroozjaei, L. Molina-Luna, O. Gutfleisch, "A Novel Magnetic Hardening Mechanism for Nd-Fe-B Permanent Magnets Based on Solid-State Phase Transformation," <text:span text:style-name="Emphasis">Adv. Funct. Mater.</text:span>, vol. 33, no. 4, 2022.</text:p>
        </text:list-item>
        <text:list-item>
          <text:p text:style-name="P5">L. Schäfer, K. Skokov, F. Maccari, I. Radulov, D. Koch, A. Mazilkin, E. Adabifiroozjaei, L. Molina-Luna, O. Gutfleisch, "A Novel Magnetic Hardening Mechanism for Nd-Fe-B Permanent Magnets Based on Solid-State Phase Transformation," <text:span text:style-name="Emphasis">Adv. Funct. Mater.</text:span>, DOI: 10.1002/adfm.202208821, 2022.</text:p>
        </text:list-item>
      </text:list>
      <text:p text:style-name="Horizontal_20_Line"/>
      <text:h text:style-name="Heading_20_2" text:outline-level="2">3) Other Functional Materials (Lab Research)</text:h>
      <text:p text:style-name="Text_20_body">My research extends beyond magnetocalorics and magnetics to cover other functional materials for energy applications. With a career spanning over two decades, I have worked on a diverse range of materials systems, from multiferroic oxides to thermoelectrics, contributing to the fundamental understanding and technological advancement of these materials.</text:p>
      <text:p text:style-name="Text_20_body">My early research focused on multiferroic materials with coupled magnetic and electric order parameters. I investigated magnetostriction in orthorhombic manganites ReMn₂O₅ (Re = Ho, Tb), where inherent magnetic frustration is lifted by small lattice distortions, giving rise to canted antiferroelectric phases [8]. I observed a colossal magnetostriction effect in both compounds and constructed novel phase transition diagrams indicating the correlation between magnetostriction and polarization [8]. This work contributed to the fundamental understanding of magnetoelectric coupling in these complex systems.</text:p>
      <text:p text:style-name="Text_20_body"><text:soft-page-break/>My investigations into SnSe-based thermoelectric compounds address the challenge of making these high-performance materials viable for practical applications by studying their stability. Thermoelectric materials can harvest waste heat and convert it into useful electricity—a key strategy for improving overall energy efficiency. Strong anharmonicity and phonon-phonon interactions can lead to ultralow thermal conductivity, which is highly desirable for thermoelectrics. The long-term stability of SnSe, however, remains a critical issue that my work directly addresses.</text:p>
      <text:p text:style-name="Text_20_body">Additionally, I have explored Electro-Sinter Forging as a novel, faster, and more energy-efficient method for producing ZrNiSn thermoelectric alloys. This work demonstrated a ~46% reduction in thermal conductivity compared to Spark Plasma Sintered samples and achieved a maximum figure of merit of 0.39 at 900 K. This research demonstrates how advanced processing techniques can simultaneously improve material performance and reduce manufacturing energy consumption.</text:p>
      <text:p text:style-name="Text_20_body">My work on EuTiO₃, specifically its anomalous thermal conductivity induced by resonant scattering, is also highly relevant. Materials with complex magnetic and structural phase transitions often exhibit exotic thermal and transport properties that are not only scientifically fascinating but also technologically promising. Using resonant scattering to probe thermal conductivity in EuTiO₃ contributes valuable knowledge to the broader field of thermal management in energy materials and devices.</text:p>
      <text:p text:style-name="Text_20_body">The importance of functional materials research extends to addressing critical supply chain challenges. Thermoelectric materials based on abundant elements can contribute to waste heat recovery without reliance on critical raw materials. Similarly, the development of materials with enhanced thermal management properties can improve the efficiency and reliability of electronic devices, reducing the overall materials demand for power electronics and cooling systems.</text:p>
      <text:h text:style-name="Heading_20_3" text:outline-level="3">Literature References</text:h>
      <text:list text:style-name="L3">
        <text:list-item>
          <text:p text:style-name="P6">M. Thiem, A.-K. Emmerich, I. Radulov, A. Weidenkaff, W. Xie, "Stability of SnSe-Based Thermoelectric Compounds," <text:span text:style-name="Emphasis">Materials</text:span>, vol. 18, 2025.</text:p>
        </text:list-item>
        <text:list-item>
          <text:p text:style-name="P6">V.G. Arachchige, S. Recalcati, J. Rossa, S. Yoon, K. Skokov, I. Radulov, S. Klemenz, "Thermoelectric properties of Electro-Sinter Forged ZrNiSn," <text:span text:style-name="Emphasis">J. Alloys Compd.</text:span>, vol. 1045, 2025.</text:p>
        </text:list-item>
        <text:list-item>
          <text:p text:style-name="P6">X. Xiao et al., "Anomalous thermal conductivity of alkaline-earth-metal-substituted EuTiO₃ induced by resonant scattering," <text:span text:style-name="Emphasis">Mater. Today Phys.</text:span>, vol. 35, 2023.</text:p>
        </text:list-item>
        <text:list-item>
          <text:p text:style-name="P6">I. Radulov, V. Lovchinov, D. Dimitrov, A. Apostolov, "Magnetostriction in orthorhombic manganites," <text:span text:style-name="Emphasis">J. Phys.: Conf. Ser.</text:span>, vol. 153, art. 012064, 2009.</text:p>
        </text:list-item>
      </text:list>
      <text:p text:style-name="Horizontal_20_Line"/>
      <text:h text:style-name="Heading_20_2" text:outline-level="2">4) Prototypic of Real World Solutions (Processing and Production)</text:h>
      <text:p text:style-name="Text_20_body">This section highlights my focus on translating laboratory-scale research into real-world solutions through advanced materials processing and manufacturing technologies. This work directly addresses the critical supply chain challenges facing the rare earth industry by enabling more efficient materials utilization, recycling, and the development of alternative processing routes.</text:p>
      <text:p text:style-name="Text_20_body"><text:soft-page-break/>My work in additive manufacturing (AM) places me at the forefront of developing next-generation magnets. The ability to 3D print magnets offers transformative advantages, including the creation of complex, net-shape parts with minimal material waste—a critical advantage given the supply-chain challenges associated with rare-earth elements. The Powder Metallurgy and Metal Injection Molding sectors have recognized that Laser Powder Bed Fusion (LPBF) presents challenges such as crack formation due to rapid cooling and difficulty controlling crystallographic texture, which limits remanence. My research on LPBF of anisotropic Nd-Fe-B bonded magnets using an in-situ mechanical alignment approach addresses these challenges directly, achieving a mean alignment degree of &lt;cosθ&gt; = 0.73 and a maximum remanence of 377 mT. More recently, I contributed to the fabrication of sustainable 3D-printed anisotropic bonded magnets using recycled Nd-Fe-B powder and low-CO₂-footprint polyamide 12, demonstrating the potential for a circular economy approach to magnet manufacturing.</text:p>
      <text:p text:style-name="Text_20_body">My research on advanced sintering techniques is critical for achieving high-density components with reduced processing time and energy consumption. I have contributed significantly to the development and application of Field Assisted Sintering Technology and Spark Plasma Sintering (FAST/SPS) for permanent magnet materials [6]. This includes:</text:p>
      <text:p text:style-name="Text_20_body"><text:span text:style-name="Strong_20_Emphasis">Spark Plasma Texturing (SPT).</text:span> Together with colleagues, I developed non-conventional modes of FAST/SPS operation specifically adapted to magnet materials, including hot deformation of pre-sintered compacts—also known as spark plasma texturing (SPT) [6]. The potential of SPT was demonstrated on commercial melt-spun Nd-Fe-B powder, showing the ability to achieve controlled texture during densification [6].</text:p>
      <text:p text:style-name="Text_20_body"><text:span text:style-name="Strong_20_Emphasis">High-Pressure FAST/SPS.</text:span> I applied high-pressure FAST/SPS to the processing of rare-earth-free MnAl magnets, demonstrating densification at moderate temperatures up to 600°C and pressures up to 1000 MPa [6]. This work addresses one of the key challenges in MnAl magnet production—achieving high density while avoiding decomposition of the ferromagnetic τ-phase [6].</text:p>
      <text:p text:style-name="Text_20_body">Additionally, I have explored Electro-Sinter Forging as an alternative method for faster manufacturing of thermoelectric materials, showing a ~46% reduction in thermal conductivity compared to Spark Plasma Sintered samples [4].</text:p>
      <text:p text:style-name="Text_20_body">Additive manufacturing and advanced sintering also offer a pathway to address recycling barriers. Currently, two major recycling pathways for rare earth magnets exist: indirect recycling via traditional hydrometallurgical and pyrometallurgical processes, and direct magnet-to-magnet recycling via hydrogen-based processes [6]. My work on hydrogen decrepitation and powder production is directly relevant to the latter pathway, which allows for shorter and less energy- and chemical-intensive recycling. Studies estimate that between 18-22% of global neodymium and praseodymium demand, and 20-23% of dysprosium and terbium demand, could be met by secondary supply by 2030 [6]. However, significant barriers remain, including limited information about magnet types in end-of-life products, lack of recycling targets and ecodesign requirements, high costs, and competition with magnets sourced from non-EU countries [6]. My work on developing powders with tailored compositions and microstructures directly addresses some of these technical barriers.</text:p>
      <text:p text:style-name="Text_20_body">The Powder Metallurgy and Metal Injection Molding sectors recognize the importance of these advanced consolidation technologies. Field assisted sintering technology and spark plasma sintering offer attractive alternative methods for processing magnet materials, combining direct Joule heating <text:soft-page-break/>in a conductive die with the application of uniaxial pressure, enabling controlled densification with short cycle times [6].</text:p>
      <text:p text:style-name="Text_20_body">My systematic work on processing—including strip casting, rapid solidification (melt spinning), gas atomization, and hydrogen decrepitation—enables the creation of powders with tailored compositions and microstructures optimized for downstream processes. This comprehensive approach, from powder production to final consolidation and prototype creation such as magnetocaloric heat exchangers, underscores my ability to bridge fundamental materials science and industrial application.</text:p>
      <text:h text:style-name="Heading_20_3" text:outline-level="3">Literature References</text:h>
      <text:list text:style-name="L4">
        <text:list-item>
          <text:p text:style-name="P7">K. Schäfer et al., "Fabrication of Sustainable 3D Printed Anisotropic Bonded Magnets Using Recycled Nd–Fe–B Powder and Low CO2 Footprint Polyamide 12," <text:span text:style-name="Emphasis">Adv. Energy Sustain. Res.</text:span>, 2026.</text:p>
        </text:list-item>
        <text:list-item>
          <text:p text:style-name="P7">K. Schäfer et al., "Laser powder bed fusion of anisotropic Nd-Fe-B bonded magnets utilizing an in-situ mechanical alignment approach," <text:span text:style-name="Emphasis">J. Magn. Magn. Mater.</text:span>, vol. 583, 2023.</text:p>
        </text:list-item>
        <text:list-item>
          <text:p text:style-name="P7">I.A. Radulov et al., "Production of net-shape Mn-Al permanent magnets by electron beam melting," <text:span text:style-name="Emphasis">Additive Manufacturing</text:span>, vol. 30, p. 100787, 2019.</text:p>
        </text:list-item>
        <text:list-item>
          <text:p text:style-name="P7">V.G. Arachchige, S. Recalcati, J. Rossa, S. Yoon, K. Skokov, I. Radulov, S. Klemenz, "Thermoelectric properties of Electro-Sinter Forged ZrNiSn," <text:span text:style-name="Emphasis">J. Alloys Compd.</text:span>, vol. 1045, 2025.</text:p>
        </text:list-item>
        <text:list-item>
          <text:p text:style-name="P7">I.A. Radulov et al., "Production and properties of metal-bonded La(Fe,Mn,Si)₁₃Hₓ composite material," <text:span text:style-name="Emphasis">Acta Mater.</text:span>, vol. 127, pp. 389-399, 2017.</text:p>
        </text:list-item>
        <text:list-item>
          <text:p text:style-name="P7">M. Bram, M. Keszler, I. Radulov, S. Ener, F. Maccari, O. Gutfleisch, O. Guillon, "Non-conventional Field Assisted Sintering (FAST|SPS) Of Permanent Magnet Materials," EPMA Publications, 2025.</text:p>
        </text:list-item>
        <text:list-item>
          <text:p text:style-name="P7">E. Righetti and V. Rizos, "Understanding the barriers to recycling critical raw materials for the energy transition: The case of rare earth permanent magnets," <text:span text:style-name="Emphasis">Energy Reports</text:span>, vol. 12, pp. 1673-1682, 2024.</text:p>
        </text:list-item>
      </text:list>
      <text:p text:style-name="Standard"/>
      <text:p text:style-name="Standard"/>
      <text:p text:style-name="Standard">some aspects of their role for the energy conversion, criticality issues, supply chain. and link to ML models for material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1T09:41:48.147538000</meta:creation-date>
    <dc:date>2026-07-01T12:56:15.244816000</dc:date>
    <meta:editing-duration>PT30M56S</meta:editing-duration>
    <meta:editing-cycles>1</meta:editing-cycles>
    <meta:document-statistic meta:table-count="0" meta:image-count="0" meta:object-count="0" meta:page-count="10" meta:paragraph-count="95" meta:word-count="4362" meta:character-count="31529" meta:non-whitespace-character-count="27382"/>
    <meta:generator>LibreOffice/26.2.3.2$MacOSX_AARCH64 LibreOffice_project/70e089b17412e4cb7773e41413306b17a2328c34</meta:generator>
  </office:meta>
</office:document-meta>
</file>